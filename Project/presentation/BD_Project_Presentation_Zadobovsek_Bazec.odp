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6FF000002C7D8DD0C1050DC44C3.png" manifest:media-type="image/png"/>
  <manifest:file-entry manifest:full-path="Pictures/10000201000001810000003FA121241089670174.png" manifest:media-type="image/png"/>
  <manifest:file-entry manifest:full-path="Pictures/100002010000011800000022DB147B66EDD7B023.png" manifest:media-type="image/png"/>
  <manifest:file-entry manifest:full-path="Pictures/10000201000000E1000000210DD80CAC682CA912.png" manifest:media-type="image/png"/>
  <manifest:file-entry manifest:full-path="Pictures/10000201000003B900000147DA8EC6FCC21BDDEB.png" manifest:media-type="image/png"/>
  <manifest:file-entry manifest:full-path="Pictures/100002010000012100000095C295EB1AB836AD1D.png" manifest:media-type="image/png"/>
  <manifest:file-entry manifest:full-path="Pictures/1000020100000125000000214247DBA2B007C5DF.png" manifest:media-type="image/png"/>
  <manifest:file-entry manifest:full-path="Pictures/1000000000000130000000D536A28ED719BE144F.png" manifest:media-type="image/png"/>
  <manifest:file-entry manifest:full-path="Pictures/1000000000000149000000AADB4FA6DA7ED17D68.png" manifest:media-type="image/png"/>
  <manifest:file-entry manifest:full-path="Pictures/1000020100000130000000D48CFF0E3431CF10B4.png" manifest:media-type="image/png"/>
  <manifest:file-entry manifest:full-path="Pictures/10000201000000E50000001BDDCBC61093F419BD.png" manifest:media-type="image/png"/>
  <manifest:file-entry manifest:full-path="Pictures/10000000000006870000024FADEB50309E5E4E02.png" manifest:media-type="image/png"/>
  <manifest:file-entry manifest:full-path="Pictures/1000020100000800000001EAB896F8C306D3E72D.png" manifest:media-type="image/png"/>
  <manifest:file-entry manifest:full-path="Pictures/1000000000000165000000DA27A5C8AB8DF18665.png" manifest:media-type="image/png"/>
  <manifest:file-entry manifest:full-path="Pictures/10000201000002700000005FD9AFBBB819D4F13B.png" manifest:media-type="image/png"/>
  <manifest:file-entry manifest:full-path="Pictures/100002010000015C0000002148AC632687B5F2B5.png" manifest:media-type="image/png"/>
  <manifest:file-entry manifest:full-path="Pictures/1000020100000800000003D767043BC37415BCD4.png" manifest:media-type="image/png"/>
  <manifest:file-entry manifest:full-path="Pictures/1000020100000187000001A9A8A872619ED67090.png" manifest:media-type="image/png"/>
  <manifest:file-entry manifest:full-path="Pictures/100000000000060F0000024F37D41D4913BC516D.png" manifest:media-type="image/png"/>
  <manifest:file-entry manifest:full-path="Pictures/10000000000006FF000003D11507C8EB63FB6FDC.png" manifest:media-type="image/png"/>
  <manifest:file-entry manifest:full-path="Pictures/10000000000004A70000024FF420AF74764AF17C.png" manifest:media-type="image/png"/>
  <manifest:file-entry manifest:full-path="Pictures/1000020100000800000002B7F10069DD4950DD06.png" manifest:media-type="image/png"/>
  <manifest:file-entry manifest:full-path="Pictures/100000000000018F00000165D4DE3C8A1A322AEA.png" manifest:media-type="image/png"/>
  <manifest:file-entry manifest:full-path="Pictures/100002010000012500000021AA9DDB1CDD05501F.png" manifest:media-type="image/png"/>
  <manifest:file-entry manifest:full-path="Pictures/10000201000003C70000012D1E9365E980042913.png" manifest:media-type="image/png"/>
  <manifest:file-entry manifest:full-path="Pictures/100002010000033E00000141C48B29B13447C34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outline1" style:list-style-name="L1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2"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text-align="start" style:font-independent-line-spacing="true"/>
      <style:text-properties fo:font-size="14pt"/>
    </style:style>
    <style:style style:name="P13" style:family="paragraph">
      <loext:graphic-properties draw:fill="none" draw:fill-color="#ffffff"/>
      <style:paragraph-properties fo:text-align="start" style:font-independent-line-spacing="true"/>
      <style:text-properties fo:font-size="11pt"/>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1.058cm" fo:margin-top="0.423cm" fo:margin-bottom="0.423cm" fo:line-height="115%" fo:text-align="start" fo:text-indent="0cm" style:writing-mode="lr-tb">
        <style:tab-stops>
          <style:tab-stop style:position="0cm"/>
        </style:tab-stops>
      </style:paragraph-properties>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5"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188038"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71cm" text:min-label-width="0.899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71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Big data project presentation</text:span></text:p>
          </draw:text-box>
        </draw:frame>
        <draw:frame draw:name="Google Shape;55;p13" presentation:style-name="pr2" draw:text-style-name="P4" draw:layer="layout" svg:width="16.07cm" svg:height="2.201cm" svg:x="5.447cm" svg:y="7.873cm" presentation:class="subtitle" presentation:user-transformed="true">
          <draw:text-box>
            <text:p text:style-name="P3"><text:span text:style-name="T2">Matija Bažec, Matic Zadobovšek</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placeholder="true" presentation:user-transformed="true">
            <draw:text-box/>
          </draw:frame>
        </presentation:notes>
      </draw:page>
      <draw:page draw:name="Completed tasks so far"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3"><text:span text:style-name="T3">Completed tasks so far</text:span></text:p>
          </draw:text-box>
        </draw:frame>
        <draw:frame draw:name="Google Shape;61;p14" presentation:style-name="pr5" draw:text-style-name="P8" draw:layer="layout" svg:width="23.667cm" svg:height="9.489cm" svg:x="0.866cm" svg:y="3.201cm" presentation:class="outline" presentation:user-transformed="true">
          <draw:text-box>
            <text:list text:style-name="L4">
              <text:list-item>
                <text:p text:style-name="P7"><text:span text:style-name="T4">T0: Data preparation</text:span></text:p>
              </text:list-item>
              <text:list-item>
                <text:p text:style-name="P7"><text:span text:style-name="T4">T1: Data processing</text:span></text:p>
              </text:list-item>
              <text:list-item>
                <text:p text:style-name="P7"><text:span text:style-name="T4">T2: Data quality</text:span></text:p>
              </text:list-item>
              <text:list-item>
                <text:p text:style-name="P7"><text:span text:style-name="T4">T3: Exploratory data analysis</text:span></text:p>
              </text:list-item>
              <text:list-item>
                <text:p text:style-name="P7"><text:span text:style-name="T4">T5: Data augmentation</text:span></text:p>
              </text:list-item>
              <text:list-item>
                <text:p text:style-name="P7"><text:span text:style-name="T4">T6: Streaming</text:span></text:p>
              </text:list-item>
              <text:list-item>
                <text:p text:style-name="P7"><text:span text:style-name="T4">T8: FHVHV market impact</text:span></text:p>
              </text:list-item>
            </text:list>
          </draw:text-box>
        </draw:frame>
        <presentation:notes draw:style-name="dp2">
          <draw:page-thumbnail draw:name="Google Shape;57;g3e5c475c4e7_0_317:notes" draw:style-name="gr1" draw:layer="layout" svg:width="16.932cm" svg:height="9.524cm" svg:x="1.059cm" svg:y="1.905cm" draw:page-number="2" presentation:class="page"/>
          <draw:frame draw:name="Google Shape;58;g3e5c475c4e7_0_317:notes" presentation:style-name="pr6" draw:text-style-name="P5" draw:layer="layout" svg:width="15.239cm" svg:height="11.429cm" svg:x="1.905cm" svg:y="12.065cm" presentation:class="notes" presentation:placeholder="true" presentation:user-transformed="true">
            <draw:text-box/>
          </draw:frame>
        </presentation:notes>
      </draw:page>
      <draw:page draw:name="T0: Data preparation (BRONZE layer)" draw:style-name="dp1" draw:master-page-name="TITLE_5f_AND_5f_BODY" presentation:presentation-page-layout-name="AL2T1">
        <draw:frame draw:name="Google Shape;66;p15" presentation:style-name="pr4" draw:text-style-name="P6" draw:layer="layout" svg:width="23.667cm" svg:height="1.59cm" svg:x="0.215cm" svg:y="0.206cm" presentation:class="title" presentation:user-transformed="true">
          <draw:text-box>
            <text:p text:style-name="P9"><text:span text:style-name="T4">T0: Data preparation (BRONZE layer)</text:span></text:p>
          </draw:text-box>
        </draw:frame>
        <draw:frame draw:name="Google Shape;67;p15" draw:style-name="gr2" draw:text-style-name="P10" draw:layer="layout" svg:width="8.773cm" svg:height="1.335cm" svg:x="1.527cm" svg:y="3.195cm">
          <draw:image xlink:href="Pictures/10000201000002700000005FD9AFBBB819D4F13B.png" xlink:type="simple" xlink:show="embed" xlink:actuate="onLoad">
            <text:p/>
          </draw:image>
        </draw:frame>
        <draw:frame draw:name="Google Shape;68;p15" draw:style-name="gr2" draw:text-style-name="P10" draw:layer="layout" svg:width="5.952cm" svg:height="0.872cm" svg:x="16.053cm" svg:y="3.427cm">
          <draw:image xlink:href="Pictures/10000201000000E1000000210DD80CAC682CA912.png" xlink:type="simple" xlink:show="embed" xlink:actuate="onLoad">
            <text:p/>
          </draw:image>
        </draw:frame>
        <draw:custom-shape draw:name="Google Shape;69;p15" draw:style-name="gr3" draw:text-style-name="P10" draw:layer="layout" svg:width="5.037cm" svg:height="0.001cm" draw:transform="rotate (-3.14159265358979) translate (15.67cm 3.887cm)">
          <text:p/>
          <draw:enhanced-geometry draw:mirror-horizontal="false" draw:mirror-vertical="false" svg:viewBox="0 0 21600 21600" draw:type="mso-spt32" draw:enhanced-path="M 0 0 L 21600 21600 N"/>
        </draw:custom-shape>
        <draw:custom-shape draw:name="Google Shape;70;p15" draw:style-name="gr4" draw:text-style-name="P12" draw:layer="layout" svg:width="5.662cm" svg:height="2.033cm" svg:x="10.319cm" svg:y="1.889cm">
          <text:list text:style-name="L5">
            <text:list-item>
              <text:p text:style-name="P11"><text:span text:style-name="T5">Get missing parquet fi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5" draw:style-name="gr3" draw:text-style-name="P10" draw:layer="layout" svg:width="0.017cm" svg:height="3.18cm" svg:x="6.088cm" svg:y="4.917cm">
          <text:p/>
          <draw:enhanced-geometry draw:mirror-horizontal="true" draw:mirror-vertical="false" svg:viewBox="0 0 21600 21600" draw:type="mso-spt32" draw:enhanced-path="M 0 0 L 21600 21600 N"/>
        </draw:custom-shape>
        <draw:custom-shape draw:name="Google Shape;72;p15" draw:style-name="gr4" draw:text-style-name="P12" draw:layer="layout" svg:width="4.099cm" svg:height="3.557cm" svg:x="6.219cm" svg:y="4.715cm">
          <text:p text:style-name="P3"><text:span text:style-name="T5">2. Upload to Snowflake BRONZE st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5" draw:style-name="gr2" draw:text-style-name="P10" draw:layer="layout" svg:width="6.058cm" svg:height="0.713cm" svg:x="3.234cm" svg:y="8.306cm">
          <draw:image xlink:href="Pictures/10000201000000E50000001BDDCBC61093F419BD.png" xlink:type="simple" xlink:show="embed" xlink:actuate="onLoad">
            <text:p/>
          </draw:image>
        </draw:frame>
        <draw:frame draw:name="Google Shape;74;p15" draw:style-name="gr2" draw:text-style-name="P10" draw:layer="layout" svg:width="7.905cm" svg:height="4.084cm" svg:x="15.432cm" svg:y="6.621cm">
          <draw:image xlink:href="Pictures/1000000000000149000000AADB4FA6DA7ED17D68.png" xlink:type="simple" xlink:show="embed" xlink:actuate="onLoad">
            <text:p/>
          </draw:image>
        </draw:frame>
        <draw:custom-shape draw:name="Google Shape;75;p15" draw:style-name="gr3" draw:text-style-name="P10" draw:layer="layout" svg:width="5.66cm" svg:height="0.032cm" draw:transform="rotate (-3.14159265358979) translate (15.082cm 8.664cm)">
          <text:p/>
          <draw:enhanced-geometry draw:mirror-horizontal="true" draw:mirror-vertical="false" svg:viewBox="0 0 21600 21600" draw:type="mso-spt32" draw:enhanced-path="M 0 0 L 21600 21600 N"/>
        </draw:custom-shape>
        <draw:frame draw:name="Google Shape;76;p15" draw:style-name="gr2" draw:text-style-name="P10" draw:layer="layout" svg:width="6.79cm" svg:height="4.757cm" svg:x="2.794cm" svg:y="9.306cm">
          <draw:image xlink:href="Pictures/1000000000000130000000D536A28ED719BE144F.png" xlink:type="simple" xlink:show="embed" xlink:actuate="onLoad">
            <text:p/>
          </draw:image>
        </draw:frame>
        <draw:custom-shape draw:name="Google Shape;77;p15" draw:style-name="gr3" draw:text-style-name="P10" draw:layer="layout" svg:width="5.037cm" svg:height="0.036cm" svg:x="9.968cm" svg:y="9.974cm">
          <text:p/>
          <draw:enhanced-geometry draw:mirror-horizontal="true" draw:mirror-vertical="false" svg:viewBox="0 0 21600 21600" draw:type="mso-spt32" draw:enhanced-path="M 0 0 L 21600 21600 N"/>
        </draw:custom-shape>
        <draw:custom-shape draw:name="Google Shape;78;p15" draw:style-name="gr5" draw:text-style-name="P12" draw:layer="layout" svg:width="5.562cm" svg:height="2.445cm" svg:x="9.727cm" svg:y="9.911cm">
          <text:p text:style-name="P3"><text:span text:style-name="T5">3. Tables with info about column names and data ty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5" draw:style-name="gr2" draw:text-style-name="P10" draw:layer="layout" svg:width="5.582cm" svg:height="1.335cm" svg:x="9.46cm" svg:y="6.971cm">
          <draw:image xlink:href="Pictures/1000020100000800000001EAB896F8C306D3E72D.png" xlink:type="simple" xlink:show="embed" xlink:actuate="onLoad">
            <text:p/>
          </draw:image>
        </draw:frame>
        <presentation:notes draw:style-name="dp2">
          <draw:page-thumbnail draw:name="Google Shape;63;g3e5c475c4e7_0_325:notes" draw:style-name="gr1" draw:layer="layout" svg:width="16.932cm" svg:height="9.524cm" svg:x="1.059cm" svg:y="1.905cm" draw:page-number="3" presentation:class="page"/>
          <draw:frame draw:name="Google Shape;64;g3e5c475c4e7_0_325:notes" presentation:style-name="pr7" draw:text-style-name="P13" draw:layer="layout" svg:width="15.239cm" svg:height="11.429cm" svg:x="1.905cm" svg:y="12.065cm" presentation:class="notes" presentation:user-transformed="true">
            <draw:text-box>
              <text:p text:style-name="P3"><text:span text:style-name="T6">First, we used </text:span><text:span text:style-name="T7">missing_data.py</text:span><text:span text:style-name="T8"> on the Arnes HPC cluster to download parquet files that were missing from the provided dataset. Then </text:span><text:span text:style-name="T7">snowflake.py</text:span><text:span text:style-name="T8"> uploaded all raw parquet files into Snowflake internal stages in the BRONZE layer. Finally, </text:span><text:span text:style-name="T7">t0.sql</text:span><text:span text:style-name="T8"> created schema overview tables, so we could compare column names and data types across years and datasets.</text:span></text:p>
            </draw:text-box>
          </draw:frame>
        </presentation:notes>
      </draw:page>
      <draw:page draw:name="T1: Data processing (SILVER layer)" draw:style-name="dp1" draw:master-page-name="TITLE_5f_AND_5f_BODY" presentation:presentation-page-layout-name="AL2T1">
        <draw:frame draw:name="Google Shape;84;p16" presentation:style-name="pr4" draw:text-style-name="P6" draw:layer="layout" svg:width="23.667cm" svg:height="1.59cm" svg:x="0.296cm" svg:y="0.28cm" presentation:class="title" presentation:user-transformed="true">
          <draw:text-box>
            <text:p text:style-name="P9"><text:span text:style-name="T4">T1: Data processing (SILVER layer)</text:span></text:p>
          </draw:text-box>
        </draw:frame>
        <draw:frame draw:name="Google Shape;85;p16" draw:style-name="gr2" draw:text-style-name="P10" draw:layer="layout" svg:width="8.525cm" svg:height="5.205cm" svg:x="15.638cm" svg:y="1.717cm">
          <draw:image xlink:href="Pictures/1000000000000165000000DA27A5C8AB8DF18665.png" xlink:type="simple" xlink:show="embed" xlink:actuate="onLoad">
            <text:p/>
          </draw:image>
        </draw:frame>
        <draw:frame draw:name="Google Shape;86;p16" draw:style-name="gr2" draw:text-style-name="P10" draw:layer="layout" svg:width="7.293cm" svg:height="5.086cm" svg:x="1.05cm" svg:y="1.889cm">
          <draw:image xlink:href="Pictures/1000020100000130000000D48CFF0E3431CF10B4.png" xlink:type="simple" xlink:show="embed" xlink:actuate="onLoad">
            <text:p/>
          </draw:image>
        </draw:frame>
        <draw:frame draw:name="Google Shape;87;p16" draw:style-name="gr2" draw:text-style-name="P10" draw:layer="layout" svg:width="21.009cm" svg:height="7.129cm" svg:x="1.842cm" svg:y="7.144cm">
          <draw:image xlink:href="Pictures/1000020100000800000002B7F10069DD4950DD06.png" xlink:type="simple" xlink:show="embed" xlink:actuate="onLoad">
            <text:p/>
          </draw:image>
        </draw:frame>
        <draw:custom-shape draw:name="Google Shape;88;p16" draw:style-name="gr3" draw:text-style-name="P10" draw:layer="layout" svg:width="7.042cm" svg:height="0.036cm" svg:x="8.352cm" svg:y="5.726cm">
          <text:p/>
          <draw:enhanced-geometry draw:mirror-horizontal="false" draw:mirror-vertical="false" svg:viewBox="0 0 21600 21600" draw:type="mso-spt32" draw:enhanced-path="M 0 0 L 21600 21600 N"/>
        </draw:custom-shape>
        <draw:custom-shape draw:name="Google Shape;89;p16" draw:style-name="gr5" draw:text-style-name="P12" draw:layer="layout" svg:width="8.108cm" svg:height="4.076cm" svg:x="7.616cm" svg:y="2.104cm">
          <text:list text:style-name="L8">
            <text:list-item>
              <text:p text:style-name="P11"><text:span text:style-name="T9">Schema unification</text:span></text:p>
            </text:list-item>
            <text:list-item>
              <text:p text:style-name="P11"><text:span text:style-name="T9">Standardize column names and data types</text:span></text:p>
            </text:list-item>
            <text:list-item>
              <text:p text:style-name="P11"><text:span text:style-name="T9">Add pickup_year, pickup_month</text:span></text:p>
            </text:list-item>
          </text:list>
          <text:p text:style-name="P3"><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3e5c475c4e7_2_16:notes" draw:style-name="gr1" draw:layer="layout" svg:width="16.932cm" svg:height="9.524cm" svg:x="1.059cm" svg:y="1.905cm" draw:page-number="4" presentation:class="page"/>
          <draw:frame draw:name="Google Shape;82;g3e5c475c4e7_2_16:notes" presentation:style-name="pr7" draw:text-style-name="P13" draw:layer="layout" svg:width="15.239cm" svg:height="11.429cm" svg:x="1.905cm" svg:y="12.065cm" presentation:class="notes" presentation:user-transformed="true">
            <draw:text-box>
              <text:p text:style-name="P3"><text:span text:style-name="T6">In T1 we moved from the raw BRONZE layer into the SILVER layer. The main problem was that the parquet files are not perfectly consistent across years, so in </text:span><text:span text:style-name="T7">t1.sql</text:span><text:span text:style-name="T8"> we unified schemas, standardized column names and converted changing data types. We also added </text:span><text:span text:style-name="T7">pickup_year</text:span><text:span text:style-name="T8">, </text:span><text:span text:style-name="T7">pickup_month</text:span><text:span text:style-name="T8"> and </text:span><text:span text:style-name="T7">source_file</text:span><text:span text:style-name="T8">, which makes later filtering and quality checks easier. The result is four clean structured SILVER tables: Yellow, Green, FHV and FHVHV trips. At this stage we did not remove bad rows yet; that is done in T2.</text:span></text:p>
            </draw:text-box>
          </draw:frame>
        </presentation:notes>
      </draw:page>
      <draw:page draw:name="T2: Data quality (GOLD layer summaries)" draw:style-name="dp1" draw:master-page-name="TITLE_5f_AND_5f_BODY" presentation:presentation-page-layout-name="AL2T1">
        <draw:frame draw:name="Google Shape;94;p17" presentation:style-name="pr4" draw:text-style-name="P6" draw:layer="layout" svg:width="23.667cm" svg:height="1.59cm" svg:x="0.333cm" svg:y="0.776cm" presentation:class="title" presentation:user-transformed="true">
          <draw:text-box>
            <text:p text:style-name="P9"><text:span text:style-name="T4">T2: Data quality (GOLD layer summaries)</text:span></text:p>
          </draw:text-box>
        </draw:frame>
        <draw:frame draw:name="Google Shape;95;p17" draw:style-name="gr2" draw:text-style-name="P10" draw:layer="layout" svg:width="8.525cm" svg:height="5.205cm" svg:x="0.45cm" svg:y="4.16cm">
          <draw:image xlink:href="Pictures/1000000000000165000000DA27A5C8AB8DF18665.png" xlink:type="simple" xlink:show="embed" xlink:actuate="onLoad">
            <text:p/>
          </draw:image>
        </draw:frame>
        <draw:frame draw:name="Google Shape;96;p17" draw:style-name="gr2" draw:text-style-name="P10" draw:layer="layout" svg:width="7.645cm" svg:height="3.941cm" svg:x="17.416cm" svg:y="9.521cm">
          <draw:image xlink:href="Pictures/100002010000012100000095C295EB1AB836AD1D.png" xlink:type="simple" xlink:show="embed" xlink:actuate="onLoad">
            <text:p/>
          </draw:image>
        </draw:frame>
        <draw:frame draw:name="Google Shape;97;p17" draw:style-name="gr2" draw:text-style-name="P10" draw:layer="layout" svg:width="7.189cm" svg:height="7.815cm" svg:x="17.288cm" svg:y="1.422cm">
          <draw:image xlink:href="Pictures/1000020100000187000001A9A8A872619ED67090.png" xlink:type="simple" xlink:show="embed" xlink:actuate="onLoad">
            <text:p/>
          </draw:image>
        </draw:frame>
        <draw:custom-shape draw:name="Google Shape;98;p17" draw:style-name="gr3" draw:text-style-name="P10" draw:layer="layout" svg:width="7.741cm" svg:height="0.036cm" draw:transform="rotate (-3.14159265358979) translate (17.103cm 6.553cm)">
          <text:p/>
          <draw:enhanced-geometry draw:mirror-horizontal="true" draw:mirror-vertical="false" svg:viewBox="0 0 21600 21600" draw:type="mso-spt32" draw:enhanced-path="M 0 0 L 21600 21600 N"/>
        </draw:custom-shape>
        <draw:custom-shape draw:name="Google Shape;99;p17" draw:style-name="gr4" draw:text-style-name="P12" draw:layer="layout" svg:width="8.199cm" svg:height="4.565cm" svg:x="9.216cm" svg:y="6.572cm">
          <text:p text:style-name="P3"><text:span text:style-name="T10">- invalid pickup year</text:span></text:p>
          <text:p text:style-name="P3"><text:span text:style-name="T10">- pickup outside source month</text:span></text:p>
          <text:p text:style-name="P3"><text:span text:style-name="T10">- dropoff before pickup</text:span></text:p>
          <text:p text:style-name="P3"><text:span text:style-name="T10">- zero/nonpositive distance</text:span></text:p>
          <text:p text:style-name="P3"><text:span text:style-name="T10">- negative fare/amount</text:span></text:p>
          <text:p text:style-name="P3"><text:span text:style-name="T10">- invalid passenger 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1;g3e5c475c4e7_2_32:notes" draw:style-name="gr1" draw:layer="layout" svg:width="16.932cm" svg:height="9.524cm" svg:x="1.059cm" svg:y="1.905cm" draw:page-number="5" presentation:class="page"/>
          <draw:frame draw:name="Google Shape;92;g3e5c475c4e7_2_32:notes" presentation:style-name="pr7" draw:text-style-name="P13" draw:layer="layout" svg:width="15.239cm" svg:height="11.429cm" svg:x="1.905cm" svg:y="12.065cm" presentation:class="notes" presentation:user-transformed="true">
            <draw:text-box>
              <text:p text:style-name="P3"><text:span text:style-name="T11">In T2 we checked the quality of all four Silver datasets. For each dataset we calculated file-year level quality statistics and then aggregated them by year in the Gold layer. We checked things like impossible years, pickup outside the expected source month, dropoff before pickup, zero distance, negative fares, and invalid passenger count. Based on these results we created reusable clean views in the Silver layer. These clean views are now the base for later exploratory analysis and augmentation.</text:span></text:p>
            </draw:text-box>
          </draw:frame>
        </presentation:notes>
      </draw:page>
      <draw:page draw:name="T2: Data quality (GOLD layer)" draw:style-name="dp1" draw:master-page-name="TITLE_5f_AND_5f_BODY" presentation:presentation-page-layout-name="AL2T1">
        <draw:frame draw:name="Google Shape;104;p18" presentation:style-name="pr4" draw:text-style-name="P6" draw:layer="layout" svg:width="23.667cm" svg:height="1.59cm" svg:x="0.333cm" svg:y="0.776cm" presentation:class="title" presentation:user-transformed="true">
          <draw:text-box>
            <text:p text:style-name="P9"><text:span text:style-name="T4">T2: Data quality (GOLD layer)</text:span></text:p>
          </draw:text-box>
        </draw:frame>
        <draw:frame draw:name="Google Shape;105;p18" draw:style-name="gr2" draw:text-style-name="P10" draw:layer="layout" svg:width="25.258cm" svg:height="12.123cm" svg:x="0cm" svg:y="2.292cm">
          <draw:image xlink:href="Pictures/1000020100000800000003D767043BC37415BCD4.png" xlink:type="simple" xlink:show="embed" xlink:actuate="onLoad">
            <text:p/>
          </draw:image>
        </draw:frame>
        <presentation:notes draw:style-name="dp2">
          <draw:page-thumbnail draw:name="Google Shape;101;g3e5c475c4e7_2_46:notes" draw:style-name="gr1" draw:layer="layout" svg:width="16.932cm" svg:height="9.524cm" svg:x="1.059cm" svg:y="1.905cm" draw:page-number="6" presentation:class="page"/>
          <draw:frame draw:name="Google Shape;102;g3e5c475c4e7_2_46:notes" presentation:style-name="pr7" draw:text-style-name="P13" draw:layer="layout" svg:width="15.239cm" svg:height="11.429cm" svg:x="1.905cm" svg:y="12.065cm" presentation:class="notes" presentation:user-transformed="true">
            <draw:text-box>
              <text:p text:style-name="P3"><text:span text:style-name="T11">The chart here is an example for Yellow Taxi. It shows the percentage of rows with each issue by pickup year.</text:span></text:p>
            </draw:text-box>
          </draw:frame>
        </presentation:notes>
      </draw:page>
      <draw:page draw:name="T3: Exploratory data analysis&#10;" draw:style-name="dp1" draw:master-page-name="TITLE_5f_AND_5f_BODY" presentation:presentation-page-layout-name="AL2T1">
        <draw:frame draw:name="Google Shape;110;p19" presentation:style-name="pr4" draw:text-style-name="P6" draw:layer="layout" svg:width="23.667cm" svg:height="1.59cm" svg:x="0.866cm" svg:y="1.236cm" presentation:class="title" presentation:user-transformed="true">
          <draw:text-box>
            <text:p text:style-name="P14"><text:span text:style-name="T4">T3: Exploratory data analysis</text:span><text:span text:style-name="T4"><text:line-break/></text:span><text:span text:style-name="T4"/></text:p>
          </draw:text-box>
        </draw:frame>
        <draw:frame draw:name="Google Shape;111;p19" draw:style-name="gr2" draw:text-style-name="P10" draw:layer="layout" svg:width="23.667cm" svg:height="8.609cm" svg:x="0.866cm" svg:y="3.641cm">
          <draw:image xlink:href="Pictures/10000000000006870000024FADEB50309E5E4E02.png" xlink:type="simple" xlink:show="embed" xlink:actuate="onLoad">
            <text:p/>
          </draw:image>
        </draw:frame>
        <presentation:notes draw:style-name="dp2">
          <draw:page-thumbnail draw:name="Google Shape;107;g3e5c7db22e0_1_0:notes" draw:style-name="gr1" draw:layer="layout" svg:width="16.932cm" svg:height="9.524cm" svg:x="1.059cm" svg:y="1.905cm" draw:page-number="7" presentation:class="page"/>
          <draw:frame draw:name="Google Shape;108;g3e5c7db22e0_1_0:notes" presentation:style-name="pr8" draw:text-style-name="P5" draw:layer="layout" svg:width="15.239cm" svg:height="11.429cm" svg:x="1.905cm" svg:y="12.065cm" presentation:class="notes" presentation:placeholder="true" presentation:user-transformed="true">
            <draw:text-box/>
          </draw:frame>
        </presentation:notes>
      </draw:page>
      <draw:page draw:name="T3: Exploratory data analysis&#10;" draw:style-name="dp1" draw:master-page-name="TITLE_5f_AND_5f_BODY" presentation:presentation-page-layout-name="AL2T1">
        <draw:frame draw:name="Google Shape;116;p20" presentation:style-name="pr4" draw:text-style-name="P6" draw:layer="layout" svg:width="23.667cm" svg:height="1.59cm" svg:x="0.866cm" svg:y="1.236cm" presentation:class="title" presentation:user-transformed="true">
          <draw:text-box>
            <text:p text:style-name="P14"><text:span text:style-name="T4">T3: Exploratory data analysis</text:span><text:span text:style-name="T4"><text:line-break/></text:span><text:span text:style-name="T4"/></text:p>
          </draw:text-box>
        </draw:frame>
        <draw:frame draw:name="Google Shape;117;p20" draw:style-name="gr2" draw:text-style-name="P10" draw:layer="layout" svg:width="11.833cm" svg:height="4.508cm" svg:x="0.866cm" svg:y="3.201cm">
          <draw:image xlink:href="Pictures/100000000000060F0000024F37D41D4913BC516D.png" xlink:type="simple" xlink:show="embed" xlink:actuate="onLoad">
            <text:p/>
          </draw:image>
        </draw:frame>
        <draw:frame draw:name="Google Shape;118;p20" draw:style-name="gr2" draw:text-style-name="P10" draw:layer="layout" svg:width="11.833cm" svg:height="6.455cm" svg:x="12.7cm" svg:y="3.916cm">
          <draw:image xlink:href="Pictures/10000000000006FF000003D11507C8EB63FB6FDC.png" xlink:type="simple" xlink:show="embed" xlink:actuate="onLoad">
            <text:p/>
          </draw:image>
        </draw:frame>
        <draw:frame draw:name="Google Shape;119;p20" draw:style-name="gr2" draw:text-style-name="P10" draw:layer="layout" svg:width="10.582cm" svg:height="5.251cm" svg:x="1.345cm" svg:y="7.711cm">
          <draw:image xlink:href="Pictures/10000000000004A70000024FF420AF74764AF17C.png" xlink:type="simple" xlink:show="embed" xlink:actuate="onLoad">
            <text:p/>
          </draw:image>
        </draw:frame>
        <presentation:notes draw:style-name="dp2">
          <draw:page-thumbnail draw:name="Google Shape;113;g3e5c7db22e0_3_1:notes" draw:style-name="gr1" draw:layer="layout" svg:width="16.932cm" svg:height="9.524cm" svg:x="1.059cm" svg:y="1.905cm" draw:page-number="8" presentation:class="page"/>
          <draw:frame draw:name="Google Shape;114;g3e5c7db22e0_3_1:notes" presentation:style-name="pr9" draw:text-style-name="P5" draw:layer="layout" svg:width="15.239cm" svg:height="11.429cm" svg:x="1.905cm" svg:y="12.065cm" presentation:class="notes" presentation:placeholder="true" presentation:user-transformed="true">
            <draw:text-box/>
          </draw:frame>
        </presentation:notes>
      </draw:page>
      <draw:page draw:name="T5: Data augmentation&#10;" draw:style-name="dp1" draw:master-page-name="TITLE_5f_AND_5f_BODY" presentation:presentation-page-layout-name="AL2T1">
        <draw:frame draw:name="Google Shape;124;p21" presentation:style-name="pr4" draw:text-style-name="P6" draw:layer="layout" svg:width="23.667cm" svg:height="1.59cm" svg:x="0.866cm" svg:y="1.236cm" presentation:class="title" presentation:user-transformed="true">
          <draw:text-box>
            <text:p text:style-name="P14"><text:span text:style-name="T4">T5: Data augmentation</text:span><text:span text:style-name="T4"><text:line-break/></text:span><text:span text:style-name="T4"/></text:p>
          </draw:text-box>
        </draw:frame>
        <draw:frame draw:name="Google Shape;125;p21" draw:style-name="gr2" draw:text-style-name="P10" draw:layer="layout" svg:width="14.165cm" svg:height="4.408cm" svg:x="10.368cm" svg:y="7.601cm">
          <draw:image xlink:href="Pictures/10000201000003C70000012D1E9365E980042913.png" xlink:type="simple" xlink:show="embed" xlink:actuate="onLoad">
            <text:p/>
          </draw:image>
        </draw:frame>
        <draw:frame draw:name="Google Shape;126;p21" draw:style-name="gr2" draw:text-style-name="P10" draw:layer="layout" svg:width="9.084cm" svg:height="8.128cm" svg:x="0.642cm" svg:y="3.882cm">
          <draw:image xlink:href="Pictures/100000000000018F00000165D4DE3C8A1A322AEA.png" xlink:type="simple" xlink:show="embed" xlink:actuate="onLoad">
            <text:p/>
          </draw:image>
        </draw:frame>
        <draw:frame draw:name="Google Shape;127;p21" draw:style-name="gr2" draw:text-style-name="P10" draw:layer="layout" svg:width="12.85cm" svg:height="4.408cm" svg:x="10.368cm" svg:y="2.827cm">
          <draw:image xlink:href="Pictures/10000201000003B900000147DA8EC6FCC21BDDEB.png" xlink:type="simple" xlink:show="embed" xlink:actuate="onLoad">
            <text:p/>
          </draw:image>
        </draw:frame>
        <presentation:notes draw:style-name="dp2">
          <draw:page-thumbnail draw:name="Google Shape;121;g3e5c7db22e0_3_12:notes" draw:style-name="gr1" draw:layer="layout" svg:width="16.932cm" svg:height="9.524cm" svg:x="1.059cm" svg:y="1.905cm" draw:page-number="9" presentation:class="page"/>
          <draw:frame draw:name="Google Shape;122;g3e5c7db22e0_3_12:notes" presentation:style-name="pr10" draw:text-style-name="P5" draw:layer="layout" svg:width="15.239cm" svg:height="11.429cm" svg:x="1.905cm" svg:y="12.065cm" presentation:class="notes" presentation:placeholder="true" presentation:user-transformed="true">
            <draw:text-box/>
          </draw:frame>
        </presentation:notes>
      </draw:page>
      <draw:page draw:name="T6: Streaming&#10;" draw:style-name="dp1" draw:master-page-name="TITLE_5f_AND_5f_BODY" presentation:presentation-page-layout-name="AL2T1">
        <draw:frame draw:name="Google Shape;132;p22" presentation:style-name="pr4" draw:text-style-name="P6" draw:layer="layout" svg:width="23.667cm" svg:height="1.59cm" svg:x="0.445cm" svg:y="0.764cm" presentation:class="title" presentation:user-transformed="true">
          <draw:text-box>
            <text:p text:style-name="P14"><text:span text:style-name="T4">T6: Streaming</text:span><text:span text:style-name="T4"><text:line-break/></text:span><text:span text:style-name="T4"/></text:p>
          </draw:text-box>
        </draw:frame>
        <draw:custom-shape draw:name="Google Shape;133;p22" draw:style-name="gr3" draw:text-style-name="P10" draw:layer="layout" svg:width="1.802cm" svg:height="0.005cm" svg:x="7.195cm" svg:y="4.507cm">
          <text:p/>
          <draw:enhanced-geometry draw:mirror-horizontal="false" draw:mirror-vertical="false" svg:viewBox="0 0 21600 21600" draw:type="mso-spt32" draw:enhanced-path="M 0 0 L 21600 21600 N"/>
        </draw:custom-shape>
        <draw:frame draw:name="Google Shape;134;p22" draw:style-name="gr2" draw:text-style-name="P10" draw:layer="layout" svg:width="6.99cm" svg:height="2.703cm" svg:x="18.409cm" svg:y="4.273cm">
          <draw:image xlink:href="Pictures/100002010000033E00000141C48B29B13447C343.png" xlink:type="simple" xlink:show="embed" xlink:actuate="onLoad">
            <text:p/>
          </draw:image>
        </draw:frame>
        <draw:frame draw:name="Google Shape;135;p22" draw:style-name="gr2" draw:text-style-name="P10" draw:layer="layout" svg:width="6.86cm" svg:height="0.772cm" svg:x="0.333cm" svg:y="4.14cm">
          <draw:image xlink:href="Pictures/100002010000012500000021AA9DDB1CDD05501F.png" xlink:type="simple" xlink:show="embed" xlink:actuate="onLoad">
            <text:p/>
          </draw:image>
        </draw:frame>
        <draw:custom-shape draw:name="Google Shape;136;p22" draw:style-name="gr3" draw:text-style-name="P10" draw:layer="layout" svg:width="1.802cm" svg:height="0.005cm" svg:x="16.779cm" svg:y="4.507cm">
          <text:p/>
          <draw:enhanced-geometry draw:mirror-horizontal="false" draw:mirror-vertical="false" svg:viewBox="0 0 21600 21600" draw:type="mso-spt32" draw:enhanced-path="M 0 0 L 21600 21600 N"/>
        </draw:custom-shape>
        <draw:custom-shape draw:name="Google Shape;137;p22" draw:style-name="gr5" draw:text-style-name="P12" draw:layer="layout" svg:width="6.861cm" svg:height="0.88cm" svg:x="0.574cm" svg:y="2.496cm">
          <text:p text:style-name="P3"><text:span text:style-name="T12">Combined Yellow + FHVHV trips for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2" draw:style-name="gr5" draw:text-style-name="P12" draw:layer="layout" svg:width="6.861cm" svg:height="0.88cm" svg:x="9.143cm" svg:y="2.417cm">
          <text:p text:style-name="P3"><text:span text:style-name="T12">Replay ordered trips into Kaf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22" draw:style-name="gr5" draw:text-style-name="P12" draw:layer="layout" svg:width="6.861cm" svg:height="0.88cm" svg:x="18.474cm" svg:y="1.781cm">
          <text:p text:style-name="P3"><text:span text:style-name="T12">Kafka topics: t6-yellow-2021 / t6-fhvhv-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2" draw:style-name="gr2" draw:text-style-name="P10" draw:layer="layout" svg:width="7.586cm" svg:height="0.88cm" svg:x="9.065cm" svg:y="4.14cm">
          <draw:image xlink:href="Pictures/1000020100000125000000214247DBA2B007C5DF.png" xlink:type="simple" xlink:show="embed" xlink:actuate="onLoad">
            <text:p/>
          </draw:image>
        </draw:frame>
        <draw:custom-shape draw:name="Google Shape;141;p22" draw:style-name="gr3" draw:text-style-name="P10" draw:layer="layout" svg:width="3.162cm" svg:height="0.001cm" draw:transform="rotate (-3.14159265358979) translate (18.541cm 6.462cm)">
          <text:p/>
          <draw:enhanced-geometry draw:mirror-horizontal="false" draw:mirror-vertical="false" svg:viewBox="0 0 21600 21600" draw:type="mso-spt32" draw:enhanced-path="M 0 0 L 21600 21600 N"/>
        </draw:custom-shape>
        <draw:custom-shape draw:name="Google Shape;142;p22" draw:style-name="gr5" draw:text-style-name="P12" draw:layer="layout" svg:width="5.684cm" svg:height="0.88cm" svg:x="10.374cm" svg:y="5.752cm">
          <text:p text:style-name="P3"><text:span text:style-name="T12">Snowflake Kafka conn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22" draw:style-name="gr2" draw:text-style-name="P10" draw:layer="layout" svg:width="7.407cm" svg:height="0.899cm" svg:x="0.867cm" svg:y="6.281cm">
          <draw:image xlink:href="Pictures/100002010000011800000022DB147B66EDD7B023.png" xlink:type="simple" xlink:show="embed" xlink:actuate="onLoad">
            <text:p/>
          </draw:image>
        </draw:frame>
        <draw:custom-shape draw:name="Google Shape;144;p22" draw:style-name="gr3" draw:text-style-name="P10" draw:layer="layout" svg:width="1.397cm" svg:height="0.017cm" svg:x="8.922cm" svg:y="6.664cm">
          <text:p/>
          <draw:enhanced-geometry draw:mirror-horizontal="true" draw:mirror-vertical="false" svg:viewBox="0 0 21600 21600" draw:type="mso-spt32" draw:enhanced-path="M 0 0 L 21600 21600 N"/>
        </draw:custom-shape>
        <draw:custom-shape draw:name="Google Shape;145;p22" draw:style-name="gr3" draw:text-style-name="P10" draw:layer="layout" svg:width="0.001cm" svg:height="2.132cm" svg:x="4.003cm" svg:y="7.18cm">
          <text:p/>
          <draw:enhanced-geometry draw:mirror-horizontal="true" draw:mirror-vertical="false" svg:viewBox="0 0 21600 21600" draw:type="mso-spt32" draw:enhanced-path="M 0 0 L 21600 21600 N"/>
        </draw:custom-shape>
        <draw:custom-shape draw:name="Google Shape;146;p22" draw:style-name="gr4" draw:text-style-name="P12" draw:layer="layout" svg:width="8.332cm" svg:height="1.949cm" svg:x="0.618cm" svg:y="9.423cm">
          <text:p text:style-name="P3"><text:span text:style-name="T13">Rolling 24h stats: boroughs + top 10 lo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2" draw:style-name="gr4" draw:text-style-name="P12" draw:layer="layout" svg:width="8.901cm" svg:height="1.229cm" svg:x="0.333cm" svg:y="5.222cm">
          <text:p text:style-name="P3"><text:span text:style-name="T13">ingested messages into GO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p22" draw:style-name="gr2" draw:text-style-name="P10" draw:layer="layout" svg:width="10.185cm" svg:height="1.666cm" svg:x="0.867cm" svg:y="11.261cm">
          <draw:image xlink:href="Pictures/10000201000001810000003FA121241089670174.png" xlink:type="simple" xlink:show="embed" xlink:actuate="onLoad">
            <text:p/>
          </draw:image>
        </draw:frame>
        <draw:custom-shape draw:name="Google Shape;149;p22" draw:style-name="gr3" draw:text-style-name="P10" draw:layer="layout" svg:width="0.001cm" svg:height="2.555cm" svg:x="21.757cm" svg:y="7.289cm">
          <text:p/>
          <draw:enhanced-geometry draw:mirror-horizontal="false" draw:mirror-vertical="false" svg:viewBox="0 0 21600 21600" draw:type="mso-spt32" draw:enhanced-path="M 0 0 L 21600 21600 N"/>
        </draw:custom-shape>
        <draw:frame draw:name="Google Shape;150;p22" draw:style-name="gr2" draw:text-style-name="P10" draw:layer="layout" svg:width="9.288cm" svg:height="0.88cm" svg:x="15.578cm" svg:y="10.03cm">
          <draw:image xlink:href="Pictures/100002010000015C0000002148AC632687B5F2B5.png" xlink:type="simple" xlink:show="embed" xlink:actuate="onLoad">
            <text:p/>
          </draw:image>
        </draw:frame>
        <draw:custom-shape draw:name="Google Shape;151;p22" draw:style-name="gr4" draw:text-style-name="P12" draw:layer="layout" svg:width="11.039cm" svg:height="2.669cm" svg:x="14.125cm" svg:y="11.114cm">
          <text:p text:style-name="P3"><text:span text:style-name="T13">BIRCH clustering algorithm = builds a clustering-feature tree and clusters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9;g3e5c7db22e0_3_25:notes" draw:style-name="gr1" draw:layer="layout" svg:width="16.932cm" svg:height="9.524cm" svg:x="1.059cm" svg:y="1.905cm" draw:page-number="10" presentation:class="page"/>
          <draw:frame draw:name="Google Shape;130;g3e5c7db22e0_3_25:notes" presentation:style-name="pr7" draw:text-style-name="P13" draw:layer="layout" svg:width="15.239cm" svg:height="11.429cm" svg:x="1.905cm" svg:y="12.065cm" presentation:class="notes" presentation:user-transformed="true">
            <draw:text-box>
              <text:p text:style-name="P15"><text:span text:style-name="T11">For T6, we implemented the streaming task. We combined Yellow and FHVHV trips for 2021 into one source table, then a Python producer replayed ordered trips into two Kafka topics: one for Yellow and one for FHVHV. From Kafka, we had two paths. The Snowflake Kafka Connector ingested messages into a Gold landing table, where we computed rolling 24-hour statistics for boroughs and top 10 locations: count, mean and standard deviation for distance, duration and fare. The second path was a custom Python consumer using BIRCH. It consumed the Kafka stream in batches, converted trips into numeric features, and incrementally built a clustering-feature tree. At the end, we summarized it into 6 clusters.</text:span></text:p>
            </draw:text-box>
          </draw:frame>
        </presentation:notes>
      </draw:page>
      <draw:page draw:name="T8: FHVHV market impact&#10;" draw:style-name="dp1" draw:master-page-name="TITLE_5f_AND_5f_BODY" presentation:presentation-page-layout-name="AL2T1">
        <draw:frame draw:name="Google Shape;156;p23" presentation:style-name="pr4" draw:text-style-name="P6" draw:layer="layout" svg:width="23.667cm" svg:height="1.59cm" svg:x="0.866cm" svg:y="1.236cm" presentation:class="title" presentation:user-transformed="true">
          <draw:text-box>
            <text:p text:style-name="P14"><text:span text:style-name="T4">T8: FHVHV market impact</text:span><text:span text:style-name="T4"><text:line-break/></text:span><text:span text:style-name="T4"/></text:p>
          </draw:text-box>
        </draw:frame>
        <draw:frame draw:name="Google Shape;157;p23" presentation:style-name="pr11" draw:text-style-name="P16" draw:layer="layout" svg:width="23.667cm" svg:height="9.489cm" svg:x="0.866cm" svg:y="3.201cm" presentation:class="outline" presentation:placeholder="true" presentation:user-transformed="true">
          <draw:text-box/>
        </draw:frame>
        <draw:frame draw:name="Google Shape;158;p23" draw:style-name="gr2" draw:text-style-name="P10" draw:layer="layout" svg:width="23.59cm" svg:height="9.364cm" svg:x="0.866cm" svg:y="3.201cm">
          <draw:image xlink:href="Pictures/10000000000006FF000002C7D8DD0C1050DC44C3.png" xlink:type="simple" xlink:show="embed" xlink:actuate="onLoad">
            <text:p/>
          </draw:image>
        </draw:frame>
        <presentation:notes draw:style-name="dp2">
          <draw:page-thumbnail draw:name="Google Shape;153;g3e5c7db22e0_3_18:notes" draw:style-name="gr1" draw:layer="layout" svg:width="16.932cm" svg:height="9.524cm" svg:x="1.059cm" svg:y="1.905cm" draw:page-number="11" presentation:class="page"/>
          <draw:frame draw:name="Google Shape;154;g3e5c7db22e0_3_18:notes" presentation:style-name="pr1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5"/>
    <meta:generator>LibreOfficeDev/6.0.5.2$Linux_X86_64 LibreOffice_project/</meta:generator>
  </office:meta>
</office:document-meta>
</file>